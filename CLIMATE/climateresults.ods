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1.2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4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number-columns-repeated="4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GENCLASS</text:p>
          </table:table-cell>
          <table:table-cell table:style-name="ce14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959" calcext:value-type="percentage">
            <text:p>9,59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2" office:value-type="percentage" office:value="0.1662" calcext:value-type="percentage">
            <text:p>16,62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1215" calcext:value-type="percentage">
            <text:p>12,15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,89%</text:p>
          </table:table-cell>
          <table:table-cell table:style-name="ce15" table:formula="of:=AVERAGE([.C2:.C11])" office:value-type="percentage" office:value="0.12426" calcext:value-type="percentage">
            <text:p>12,43%</text:p>
          </table:table-cell>
          <table:table-cell table:style-name="ce15" table:formula="of:=AVERAGE([.D2:.D11])" office:value-type="percentage" office:value="0.17177" calcext:value-type="percentage">
            <text:p>17,18%</text:p>
          </table:table-cell>
          <table:table-cell table:style-name="ce15" table:formula="of:=AVERAGE([.E2:.E11])" office:value-type="percentage" office:value="0.02" calcext:value-type="percentage">
            <text:p>2,00%</text:p>
          </table:table-cell>
          <table:table-cell table:style-name="ce15" table:formula="of:=AVERAGE([.F2:.F11])" office:value-type="percentage" office:value="0.09179" calcext:value-type="percentage">
            <text:p>9,18%</text:p>
          </table:table-cell>
          <table:table-cell table:style-name="ce15" table:formula="of:=AVERAGE([.G2:.G11])" office:value-type="percentage" office:value="0.14118" calcext:value-type="percentage">
            <text:p>14,12%</text:p>
          </table:table-cell>
          <table:table-cell table:style-name="ce15" table:formula="of:=AVERAGE([.H2:.H11])" office:value-type="percentage" office:value="0.13434" calcext:value-type="percentage">
            <text:p>13,43%</text:p>
          </table:table-cell>
          <table:table-cell table:style-name="ce15" table:formula="of:=AVERAGE([.I2:.I11])" office:value-type="percentage" office:value="0.00968" calcext:value-type="percentage">
            <text:p>0,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eece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1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,10%</text:p>
          </table:table-cell>
          <table:table-cell table:style-name="ce15" table:formula="of:=AVERAGE([.C2:.C11])" office:value-type="percentage" office:value="0.04342" calcext:value-type="percentage">
            <text:p>4,34%</text:p>
          </table:table-cell>
          <table:table-cell table:style-name="ce15" table:formula="of:=AVERAGE([.D2:.D11])" office:value-type="percentage" office:value="0.5061" calcext:value-type="percentage">
            <text:p>50,61%</text:p>
          </table:table-cell>
          <table:table-cell table:style-name="ce15" table:formula="of:=AVERAGE([.E2:.E11])" office:value-type="percentage" office:value="0.00743" calcext:value-type="percentage">
            <text:p>0,74%</text:p>
          </table:table-cell>
          <table:table-cell table:style-name="ce15" table:formula="of:=AVERAGE([.F2:.F11])" office:value-type="percentage" office:value="0.0264" calcext:value-type="percentage">
            <text:p>2,64%</text:p>
          </table:table-cell>
          <table:table-cell table:style-name="ce15" table:formula="of:=AVERAGE([.G2:.G11])" office:value-type="percentage" office:value="0.06332" calcext:value-type="percentage">
            <text:p>6,33%</text:p>
          </table:table-cell>
          <table:table-cell table:style-name="ce15" table:formula="of:=AVERAGE([.H2:.H11])" office:value-type="percentage" office:value="0.06146" calcext:value-type="percentage">
            <text:p>6,15%</text:p>
          </table:table-cell>
          <table:table-cell table:style-name="ce15" table:formula="of:=AVERAGE([.I2:.I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number-columns-repeated="4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5" calcext:value-type="percentage">
            <text:p>2,15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1104" calcext:value-type="percentage">
            <text:p>11,04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06" calcext:value-type="percentage">
            <text:p>2,06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485" calcext:value-type="percentage">
            <text:p>4,85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15" calcext:value-type="percentage">
            <text:p>2,15%</text:p>
          </table:table-cell>
          <table:table-cell office:value-type="percentage" office:value="0.0503" calcext:value-type="percentage">
            <text:p>5,03%</text:p>
          </table:table-cell>
          <table:table-cell office:value-type="percentage" office:value="0.1284" calcext:value-type="percentage">
            <text:p>12,84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86" calcext:value-type="percentage">
            <text:p>3,86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1364" calcext:value-type="percentage">
            <text:p>13,64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,87%</text:p>
          </table:table-cell>
          <table:table-cell table:style-name="ce15" table:formula="of:=AVERAGE([.C2:.C11])" office:value-type="percentage" office:value="0.07091" calcext:value-type="percentage">
            <text:p>7,09%</text:p>
          </table:table-cell>
          <table:table-cell table:style-name="ce15" table:formula="of:=AVERAGE([.D2:.D11])" office:value-type="percentage" office:value="0.49792" calcext:value-type="percentage">
            <text:p>49,79%</text:p>
          </table:table-cell>
          <table:table-cell table:style-name="ce15" table:formula="of:=AVERAGE([.E2:.E11])" office:value-type="percentage" office:value="0.06329" calcext:value-type="percentage">
            <text:p>6,33%</text:p>
          </table:table-cell>
          <table:table-cell table:style-name="ce15" table:formula="of:=AVERAGE([.F2:.F11])" office:value-type="percentage" office:value="0.02897" calcext:value-type="percentage">
            <text:p>2,90%</text:p>
          </table:table-cell>
          <table:table-cell table:style-name="ce15" table:formula="of:=AVERAGE([.G2:.G11])" office:value-type="percentage" office:value="0.05656" calcext:value-type="percentage">
            <text:p>5,66%</text:p>
          </table:table-cell>
          <table:table-cell table:style-name="ce15" table:formula="of:=AVERAGE([.H2:.H11])" office:value-type="percentage" office:value="0.10252" calcext:value-type="percentage">
            <text:p>10,25%</text:p>
          </table:table-cell>
          <table:table-cell table:style-name="ce15" table:formula="of:=AVERAGE([.I2:.I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223" calcext:value-type="percentage">
            <text:p>32,23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table:number-columns-repeated="2" office:value-type="percentage" office:value="0.325" calcext:value-type="percentage">
            <text:p>32,50%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2" office:value-type="percentage" office:value="0.3179" calcext:value-type="percentage">
            <text:p>31,79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2" office:value-type="percentage" office:value="0.3214" calcext:value-type="percentage">
            <text:p>32,14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table:number-columns-repeated="2" office:value-type="percentage" office:value="0.3375" calcext:value-type="percentage">
            <text:p>33,75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64" calcext:value-type="percentage">
            <text:p>29,64%</text:p>
          </table:table-cell>
          <table:table-cell office:value-type="percentage" office:value="0.2589" calcext:value-type="percentage">
            <text:p>25,89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2" office:value-type="percentage" office:value="0.3286" calcext:value-type="percentage">
            <text:p>32,86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table:number-columns-repeated="2" office:value-type="percentage" office:value="0.3429" calcext:value-type="percentage">
            <text:p>34,29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table:number-columns-repeated="2" office:value-type="percentage" office:value="0.317" calcext:value-type="percentage">
            <text:p>31,70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2" office:value-type="percentage" office:value="0.3402" calcext:value-type="percentage">
            <text:p>34,02%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,52%</text:p>
          </table:table-cell>
          <table:table-cell table:style-name="ce15" table:formula="of:=AVERAGE([.C2:.C11])" office:value-type="percentage" office:value="0.30157" calcext:value-type="percentage">
            <text:p>30,16%</text:p>
          </table:table-cell>
          <table:table-cell table:style-name="ce15" table:formula="of:=AVERAGE([.D2:.D11])" office:value-type="percentage" office:value="0.32707" calcext:value-type="percentage">
            <text:p>32,71%</text:p>
          </table:table-cell>
          <table:table-cell table:style-name="ce15" table:formula="of:=AVERAGE([.E2:.E11])" office:value-type="percentage" office:value="0.32724" calcext:value-type="percentage">
            <text:p>32,72%</text:p>
          </table:table-cell>
          <table:table-cell table:style-name="ce15" table:formula="of:=AVERAGE([.F2:.F11])" office:value-type="percentage" office:value="0.30348" calcext:value-type="percentage">
            <text:p>30,35%</text:p>
          </table:table-cell>
          <table:table-cell table:style-name="ce15" table:formula="of:=AVERAGE([.G2:.G11])" office:value-type="percentage" office:value="0.24214" calcext:value-type="percentage">
            <text:p>24,21%</text:p>
          </table:table-cell>
          <table:table-cell table:style-name="ce15" table:formula="of:=AVERAGE([.H2:.H11])" office:value-type="percentage" office:value="0.13754" calcext:value-type="percentage">
            <text:p>13,75%</text:p>
          </table:table-cell>
          <table:table-cell table:style-name="ce15" table:formula="of:=AVERAGE([.I2:.I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number-columns-repeated="4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06" calcext:value-type="percentage">
            <text:p>1,0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24" calcext:value-type="percentage">
            <text:p>1,24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1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151" calcext:value-type="percentage">
            <text:p>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,63%</text:p>
          </table:table-cell>
          <table:table-cell table:style-name="ce15" table:formula="of:=AVERAGE([.C2:.C11])" office:value-type="percentage" office:value="0.07615" calcext:value-type="percentage">
            <text:p>7,62%</text:p>
          </table:table-cell>
          <table:table-cell table:style-name="ce15" table:formula="of:=AVERAGE([.D2:.D11])" office:value-type="percentage" office:value="0.48941" calcext:value-type="percentage">
            <text:p>48,94%</text:p>
          </table:table-cell>
          <table:table-cell table:style-name="ce15" table:formula="of:=AVERAGE([.E2:.E11])" office:value-type="percentage" office:value="0.0491" calcext:value-type="percentage">
            <text:p>4,91%</text:p>
          </table:table-cell>
          <table:table-cell table:style-name="ce15" table:formula="of:=AVERAGE([.F2:.F11])" office:value-type="percentage" office:value="0.00371" calcext:value-type="percentage">
            <text:p>0,37%</text:p>
          </table:table-cell>
          <table:table-cell table:style-name="ce15" table:formula="of:=AVERAGE([.G2:.G11])" office:value-type="percentage" office:value="0.01284" calcext:value-type="percentage">
            <text:p>1,28%</text:p>
          </table:table-cell>
          <table:table-cell table:style-name="ce15" table:formula="of:=AVERAGE([.H2:.H11])" office:value-type="percentage" office:value="0.04862" calcext:value-type="percentage">
            <text:p>4,86%</text:p>
          </table:table-cell>
          <table:table-cell table:style-name="ce15" table:formula="of:=AVERAGE([.I2:.I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6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table:number-columns-repeated="2" office:value-type="percentage" office:value="0.4677" calcext:value-type="percentage">
            <text:p>46,77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 office:value-type="percentage" office:value="0.4694" calcext:value-type="percentage">
            <text:p>46,94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1975" calcext:value-type="percentage">
            <text:p>19,75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 office:value-type="percentage" office:value="0.4818" calcext:value-type="percentage">
            <text:p>48,18%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table:number-columns-repeated="2" office:value-type="percentage" office:value="0.5058" calcext:value-type="percentage">
            <text:p>50,58%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2" office:value-type="percentage" office:value="0.4854" calcext:value-type="percentage">
            <text:p>48,54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table:number-columns-repeated="2" office:value-type="percentage" office:value="0.4686" calcext:value-type="percentage">
            <text:p>46,86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2" office:value-type="percentage" office:value="0.4703" calcext:value-type="percentage">
            <text:p>47,03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,56%</text:p>
          </table:table-cell>
          <table:table-cell table:style-name="ce15" table:formula="of:=AVERAGE([.C2:.C11])" office:value-type="percentage" office:value="0.23296" calcext:value-type="percentage">
            <text:p>23,30%</text:p>
          </table:table-cell>
          <table:table-cell table:style-name="ce15" table:formula="of:=AVERAGE([.D2:.D11])" office:value-type="percentage" office:value="0.47218" calcext:value-type="percentage">
            <text:p>47,22%</text:p>
          </table:table-cell>
          <table:table-cell table:style-name="ce15" table:formula="of:=AVERAGE([.E2:.E11])" office:value-type="percentage" office:value="0.38839" calcext:value-type="percentage">
            <text:p>38,84%</text:p>
          </table:table-cell>
          <table:table-cell table:style-name="ce15" table:formula="of:=AVERAGE([.F2:.F11])" office:value-type="percentage" office:value="0.02586" calcext:value-type="percentage">
            <text:p>2,59%</text:p>
          </table:table-cell>
          <table:table-cell table:style-name="ce15" table:formula="of:=AVERAGE([.G2:.G11])" office:value-type="percentage" office:value="0.13322" calcext:value-type="percentage">
            <text:p>13,32%</text:p>
          </table:table-cell>
          <table:table-cell table:style-name="ce15" table:formula="of:=AVERAGE([.H2:.H11])" office:value-type="percentage" office:value="0.05071" calcext:value-type="percentage">
            <text:p>5,07%</text:p>
          </table:table-cell>
          <table:table-cell table:style-name="ce15" table:formula="of:=AVERAGE([.I2:.I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4"/>
        <table:table-column table:style-name="co9" table:default-cell-style-name="ce16"/>
        <table:table-column table:style-name="co10" table:number-columns-repeated="6" table:default-cell-style-name="ce16"/>
        <table:table-column table:style-name="co11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DNN</text:p>
          </table:table-cell>
          <table:table-cell table:style-name="ce14" office:value-type="string" calcext:value-type="string">
            <text:p>BAYESNN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239" calcext:value-type="percentage">
            <text:p>2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088" calcext:value-type="percentage">
            <text:p>0,88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035" calcext:value-type="percentage">
            <text:p>0,35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1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,53%</text:p>
          </table:table-cell>
          <table:table-cell table:style-name="ce15" table:formula="of:=AVERAGE([.C2:.C11])" office:value-type="percentage" office:value="0.07808" calcext:value-type="percentage">
            <text:p>7,81%</text:p>
          </table:table-cell>
          <table:table-cell table:style-name="ce15" table:formula="of:=AVERAGE([.D2:.D11])" office:value-type="percentage" office:value="0.49097" calcext:value-type="percentage">
            <text:p>49,10%</text:p>
          </table:table-cell>
          <table:table-cell table:style-name="ce15" table:formula="of:=AVERAGE([.E2:.E11])" office:value-type="percentage" office:value="0.00522" calcext:value-type="percentage">
            <text:p>0,52%</text:p>
          </table:table-cell>
          <table:table-cell table:style-name="ce15" table:formula="of:=AVERAGE([.F2:.F11])" office:value-type="percentage" office:value="0.01961" calcext:value-type="percentage">
            <text:p>1,96%</text:p>
          </table:table-cell>
          <table:table-cell table:style-name="ce15" table:formula="of:=AVERAGE([.G2:.G11])" office:value-type="percentage" office:value="0.09602" calcext:value-type="percentage">
            <text:p>9,60%</text:p>
          </table:table-cell>
          <table:table-cell table:style-name="ce15" table:formula="of:=AVERAGE([.H2:.H11])" office:value-type="percentage" office:value="0.05052" calcext:value-type="percentage">
            <text:p>5,05%</text:p>
          </table:table-cell>
          <table:table-cell table:style-name="ce15" table:formula="of:=AVERAGE([.I2:.I11])" office:value-type="percentage" office:value="0.00626" calcext:value-type="percentage">
            <text:p>0,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5" calcext:value-type="percentage">
            <text:p>1,50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46" calcext:value-type="percentage">
            <text:p>1,46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105" calcext:value-type="percentage">
            <text:p>1,0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73" calcext:value-type="percentage">
            <text:p>0,73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32" calcext:value-type="percentage">
            <text:p>1,3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7" calcext:value-type="percentage">
            <text:p>1,37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092" calcext:value-type="percentage">
            <text:p>0,92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 office:value-type="percentage" office:value="0.0163" calcext:value-type="percentage">
            <text:p>1,63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25" calcext:value-type="percentage">
            <text:p>1,2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74" calcext:value-type="percentage">
            <text:p>0,74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,78%</text:p>
          </table:table-cell>
          <table:table-cell office:value-type="percentage" office:value="0.0137" calcext:value-type="percentage">
            <text:p>1,3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19" calcext:value-type="percentage">
            <text:p>1,19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,12%</text:p>
          </table:table-cell>
          <table:table-cell office:value-type="percentage" office:value="0.0121" calcext:value-type="percentage">
            <text:p>1,21%</text:p>
          </table:table-cell>
          <table:table-cell office:value-type="percentage" office:value="0.012" calcext:value-type="percentage">
            <text:p>1,20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,53%</text:p>
          </table:table-cell>
          <table:table-cell office:value-type="percentage" office:value="0.013" calcext:value-type="percentage">
            <text:p>1,30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82" calcext:value-type="percentage">
            <text:p>0,82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39" calcext:value-type="percentage">
            <text:p>1,39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1" calcext:value-type="percentage">
            <text:p>2,31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,85%</text:p>
          </table:table-cell>
          <table:table-cell table:style-name="ce13" table:formula="of:=AVERAGE([.C2:.C11])" office:value-type="percentage" office:value="0.01633" calcext:value-type="percentage">
            <text:p>1,63%</text:p>
          </table:table-cell>
          <table:table-cell table:style-name="ce13" table:formula="of:=AVERAGE([.D2:.D11])" office:value-type="percentage" office:value="0.01401" calcext:value-type="percentage">
            <text:p>1,4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75" calcext:value-type="percentage">
            <text:p>0,78%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,78%</text:p>
          </table:table-cell>
          <table:table-cell table:style-name="ce13" table:formula="of:=AVERAGE([.J2:.J11])" office:value-type="percentage" office:value="0.01244" calcext:value-type="percentage">
            <text:p>1,24%</text:p>
          </table:table-cell>
          <table:table-cell table:style-name="ce13" table:formula="of:=AVERAGE([.K2:.K11])" office:value-type="percentage" office:value="0.01128" calcext:value-type="percentage">
            <text:p>1,13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31" calcext:value-type="percentage">
            <text:p>0,83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77" calcext:value-type="percentage">
            <text:p>2,77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583" calcext:value-type="percentage">
            <text:p>5,83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554" calcext:value-type="percentage">
            <text:p>5,54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73" calcext:value-type="percentage">
            <text:p>2,73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06" calcext:value-type="percentage">
            <text:p>2,06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5" calcext:value-type="percentage">
            <text:p>6,50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21" calcext:value-type="percentage">
            <text:p>3,21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,12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31" calcext:value-type="percentage">
            <text:p>6,31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223" calcext:value-type="percentage">
            <text:p>2,23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31" calcext:value-type="percentage">
            <text:p>3,10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654" calcext:value-type="percentage">
            <text:p>6,5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884" calcext:value-type="percentage">
            <text:p>8,84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5" calcext:value-type="percentage">
            <text:p>2,50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55" calcext:value-type="percentage">
            <text:p>5,50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295" calcext:value-type="percentage">
            <text:p>2,95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199" calcext:value-type="percentage">
            <text:p>1,99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189" calcext:value-type="percentage">
            <text:p>1,89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758" calcext:value-type="percentage">
            <text:p>7,58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277" calcext:value-type="percentage">
            <text:p>2,77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345" calcext:value-type="percentage">
            <text:p>3,45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69" calcext:value-type="percentage">
            <text:p>2,69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336" calcext:value-type="percentage">
            <text:p>3,36%</text:p>
          </table:table-cell>
          <table:table-cell office:value-type="percentage" office:value="0.0248" calcext:value-type="percentage">
            <text:p>2,4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224" calcext:value-type="percentage">
            <text:p>2,24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03" calcext:value-type="percentage">
            <text:p>5,0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36" calcext:value-type="percentage">
            <text:p>3,36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47" calcext:value-type="percentage">
            <text:p>6,47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473" calcext:value-type="percentage">
            <text:p>4,73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59" calcext:value-type="percentage">
            <text:p>2,59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51" calcext:value-type="percentage">
            <text:p>2,51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2" calcext:value-type="percentage">
            <text:p>5,62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,22%</text:p>
          </table:table-cell>
          <table:table-cell table:style-name="ce13" table:formula="of:=AVERAGE([.C15:.C24])" office:value-type="percentage" office:value="0.03269" calcext:value-type="percentage">
            <text:p>3,27%</text:p>
          </table:table-cell>
          <table:table-cell table:style-name="ce13" table:formula="of:=AVERAGE([.D15:.D24])" office:value-type="percentage" office:value="0.0275" calcext:value-type="percentage">
            <text:p>2,7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135" calcext:value-type="percentage">
            <text:p>2,14%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,86%</text:p>
          </table:table-cell>
          <table:table-cell table:style-name="ce13" table:formula="of:=AVERAGE([.J15:.J24])" office:value-type="percentage" office:value="0.08178" calcext:value-type="percentage">
            <text:p>8,18%</text:p>
          </table:table-cell>
          <table:table-cell table:style-name="ce13" table:formula="of:=AVERAGE([.K15:.K24])" office:value-type="percentage" office:value="0.06305" calcext:value-type="percentage">
            <text:p>6,3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385" calcext:value-type="percentage">
            <text:p>4,39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97" calcext:value-type="percentage">
            <text:p>0,9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71" calcext:value-type="percentage">
            <text:p>0,71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06" calcext:value-type="percentage">
            <text:p>1,06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47" calcext:value-type="percentage">
            <text:p>1,47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33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097" calcext:value-type="percentage">
            <text:p>0,97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,29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93" calcext:value-type="percentage">
            <text:p>0,93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62" calcext:value-type="percentage">
            <text:p>0,62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,36%</text:p>
          </table:table-cell>
          <table:table-cell table:number-columns-repeated="2" office:value-type="percentage" office:value="0.0128" calcext:value-type="percentage">
            <text:p>1,28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17" calcext:value-type="percentage">
            <text:p>1,17%</text:p>
          </table:table-cell>
          <table:table-cell office:value-type="percentage" office:value="0.0116" calcext:value-type="percentage">
            <text:p>1,16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8" calcext:value-type="percentage">
            <text:p>0,80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1" calcext:value-type="percentage">
            <text:p>1,41%</text:p>
          </table:table-cell>
          <table:table-cell office:value-type="percentage" office:value="0.0107" calcext:value-type="percentage">
            <text:p>1,07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109" calcext:value-type="percentage">
            <text:p>1,09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32" calcext:value-type="percentage">
            <text:p>1,32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,52%</text:p>
          </table:table-cell>
          <table:table-cell table:style-name="ce13" table:formula="of:=AVERAGE([.C28:.C37])" office:value-type="percentage" office:value="0.01324" calcext:value-type="percentage">
            <text:p>1,32%</text:p>
          </table:table-cell>
          <table:table-cell table:style-name="ce13" table:formula="of:=AVERAGE([.D28:.D37])" office:value-type="percentage" office:value="0.01258" calcext:value-type="percentage">
            <text:p>1,26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541" calcext:value-type="percentage">
            <text:p>0,54%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,89%</text:p>
          </table:table-cell>
          <table:table-cell table:style-name="ce13" table:formula="of:=AVERAGE([.J28:.J37])" office:value-type="percentage" office:value="0.01582" calcext:value-type="percentage">
            <text:p>1,58%</text:p>
          </table:table-cell>
          <table:table-cell table:style-name="ce13" table:formula="of:=AVERAGE([.K28:.K37])" office:value-type="percentage" office:value="0.013" calcext:value-type="percentage">
            <text:p>1,30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938" calcext:value-type="percentage">
            <text:p>0,94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152" calcext:value-type="percentage">
            <text:p>1,52%</text:p>
          </table:table-cell>
          <table:table-cell office:value-type="percentage" office:value="0.0068" calcext:value-type="percentage">
            <text:p>0,68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02" calcext:value-type="percentage">
            <text:p>1,02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11" calcext:value-type="percentage">
            <text:p>1,10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44" calcext:value-type="percentage">
            <text:p>0,4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24" calcext:value-type="percentage">
            <text:p>1,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204" calcext:value-type="percentage">
            <text:p>2,0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6" calcext:value-type="percentage">
            <text:p>1,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19" calcext:value-type="percentage">
            <text:p>1,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,37%</text:p>
          </table:table-cell>
          <table:table-cell table:style-name="ce13" table:formula="of:=AVERAGE([.C41:.C50])" office:value-type="percentage" office:value="0.01568" calcext:value-type="percentage">
            <text:p>1,57%</text:p>
          </table:table-cell>
          <table:table-cell table:style-name="ce13" table:formula="of:=AVERAGE([.D41:.D50])" office:value-type="percentage" office:value="0.0106333333333333" calcext:value-type="percentage">
            <text:p>1,06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574" calcext:value-type="percentage">
            <text:p>0,5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generation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56" calcext:value-type="percentage">
            <text:p>1,56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124" calcext:value-type="percentage">
            <text:p>1,24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64" calcext:value-type="percentage">
            <text:p>0,64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51" calcext:value-type="percentage">
            <text:p>2,51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69" calcext:value-type="percentage">
            <text:p>1,69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155" calcext:value-type="percentage">
            <text:p>1,55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128" calcext:value-type="percentage">
            <text:p>1,28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" calcext:value-type="percentage">
            <text:p>0,90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4" calcext:value-type="percentage">
            <text:p>1,9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4" calcext:value-type="percentage">
            <text:p>1,1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56" calcext:value-type="percentage">
            <text:p>1,56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91" calcext:value-type="percentage">
            <text:p>0,91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31" calcext:value-type="percentage">
            <text:p>1,31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229" calcext:value-type="percentage">
            <text:p>2,29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256" calcext:value-type="percentage">
            <text:p>2,56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2401" calcext:value-type="percentage">
            <text:p>2,40%</text:p>
          </table:table-cell>
          <table:table-cell table:style-name="ce13" table:formula="of:=AVERAGE([.C2:.C11])" office:value-type="percentage" office:value="0.01961" calcext:value-type="percentage">
            <text:p>1,96%</text:p>
          </table:table-cell>
          <table:table-cell table:style-name="ce13" table:formula="of:=AVERAGE([.D2:.D11])" office:value-type="percentage" office:value="0.01602" calcext:value-type="percentage">
            <text:p>1,6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3" calcext:value-type="percentage">
            <text:p>0,73%</text:p>
          </table:table-cell>
          <table:table-cell table:style-name="ce13" table:number-columns-repeated="2"/>
          <table:table-cell table:style-name="ce13" table:formula="of:=AVERAGE([.I2:.I11])" office:value-type="percentage" office:value="0.02203" calcext:value-type="percentage">
            <text:p>2,20%</text:p>
          </table:table-cell>
          <table:table-cell table:style-name="ce13" table:formula="of:=AVERAGE([.J2:.J11])" office:value-type="percentage" office:value="0.01742" calcext:value-type="percentage">
            <text:p>1,74%</text:p>
          </table:table-cell>
          <table:table-cell table:style-name="ce13" table:formula="of:=AVERAGE([.K2:.K11])" office:value-type="percentage" office:value="0.01315" calcext:value-type="percentage">
            <text:p>1,32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23" calcext:value-type="percentage">
            <text:p>0,8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894" calcext:value-type="percentage">
            <text:p>8,94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482" calcext:value-type="percentage">
            <text:p>4,82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" calcext:value-type="percentage">
            <text:p>2,80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139" calcext:value-type="percentage">
            <text:p>11,39%</text:p>
          </table:table-cell>
          <table:table-cell office:value-type="percentage" office:value="0.0826" calcext:value-type="percentage">
            <text:p>8,26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404" calcext:value-type="percentage">
            <text:p>4,0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07" calcext:value-type="percentage">
            <text:p>3,07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126" calcext:value-type="percentage">
            <text:p>1,26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692" calcext:value-type="percentage">
            <text:p>6,92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429" calcext:value-type="percentage">
            <text:p>4,29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344" calcext:value-type="percentage">
            <text:p>3,44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341" calcext:value-type="percentage">
            <text:p>3,41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34" calcext:value-type="percentage">
            <text:p>9,3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518" calcext:value-type="percentage">
            <text:p>5,18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299" calcext:value-type="percentage">
            <text:p>2,99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305" calcext:value-type="percentage">
            <text:p>3,05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7523" calcext:value-type="percentage">
            <text:p>7,52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296" calcext:value-type="percentage">
            <text:p>2,96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23" calcext:value-type="percentage">
            <text:p>10,23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509" calcext:value-type="percentage">
            <text:p>5,09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03" calcext:value-type="percentage">
            <text:p>3,03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0612" calcext:value-type="percentage">
            <text:p>6,12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11" calcext:value-type="percentage">
            <text:p>4,11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643" calcext:value-type="percentage">
            <text:p>6,4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232" calcext:value-type="percentage">
            <text:p>2,32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74" calcext:value-type="percentage">
            <text:p>3,74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44" calcext:value-type="percentage">
            <text:p>6,44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259" calcext:value-type="percentage">
            <text:p>2,59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12" calcext:value-type="percentage">
            <text:p>3,12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888" calcext:value-type="percentage">
            <text:p>8,88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27" calcext:value-type="percentage">
            <text:p>5,27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4322" calcext:value-type="percentage">
            <text:p>4,32%</text:p>
          </table:table-cell>
          <table:table-cell table:style-name="ce13" table:formula="of:=AVERAGE([.C15:.C24])" office:value-type="percentage" office:value="0.03753" calcext:value-type="percentage">
            <text:p>3,75%</text:p>
          </table:table-cell>
          <table:table-cell table:style-name="ce13" table:formula="of:=AVERAGE([.D15:.D24])" office:value-type="percentage" office:value="0.03051" calcext:value-type="percentage">
            <text:p>3,0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584" calcext:value-type="percentage">
            <text:p>2,58%</text:p>
          </table:table-cell>
          <table:table-cell/>
          <table:table-cell table:style-name="ce13"/>
          <table:table-cell table:style-name="ce13" table:formula="of:=AVERAGE([.I15:.I24])" office:value-type="percentage" office:value="0.14117" calcext:value-type="percentage">
            <text:p>14,12%</text:p>
          </table:table-cell>
          <table:table-cell table:style-name="ce13" table:formula="of:=AVERAGE([.J15:.J24])" office:value-type="percentage" office:value="0.10489" calcext:value-type="percentage">
            <text:p>10,49%</text:p>
          </table:table-cell>
          <table:table-cell table:style-name="ce13" table:formula="of:=AVERAGE([.K15:.K24])" office:value-type="percentage" office:value="0.079083" calcext:value-type="percentage">
            <text:p>7,9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18" calcext:value-type="percentage">
            <text:p>4,18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385" calcext:value-type="percentage">
            <text:p>3,8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03" calcext:value-type="percentage">
            <text:p>2,03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01" calcext:value-type="percentage">
            <text:p>2,01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306" calcext:value-type="percentage">
            <text:p>3,06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207" calcext:value-type="percentage">
            <text:p>2,07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42" calcext:value-type="percentage">
            <text:p>1,42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44" calcext:value-type="percentage">
            <text:p>0,44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8" calcext:value-type="percentage">
            <text:p>1,80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58" calcext:value-type="percentage">
            <text:p>1,58%</text:p>
          </table:table-cell>
          <table:table-cell office:value-type="percentage" office:value="0.0139" calcext:value-type="percentage">
            <text:p>1,39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46" calcext:value-type="percentage">
            <text:p>1,46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82" calcext:value-type="percentage">
            <text:p>1,82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1" calcext:value-type="percentage">
            <text:p>2,81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7" calcext:value-type="percentage">
            <text:p>1,70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6" calcext:value-type="percentage">
            <text:p>1,66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46" calcext:value-type="percentage">
            <text:p>2,46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43" calcext:value-type="percentage">
            <text:p>1,43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42" calcext:value-type="percentage">
            <text:p>1,42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3028" calcext:value-type="percentage">
            <text:p>3,03%</text:p>
          </table:table-cell>
          <table:table-cell table:style-name="ce13" table:formula="of:=AVERAGE([.C28:.C37])" office:value-type="percentage" office:value="0.02351" calcext:value-type="percentage">
            <text:p>2,35%</text:p>
          </table:table-cell>
          <table:table-cell table:style-name="ce13" table:formula="of:=AVERAGE([.D28:.D37])" office:value-type="percentage" office:value="0.01667" calcext:value-type="percentage">
            <text:p>1,67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626" calcext:value-type="percentage">
            <text:p>0,63%</text:p>
          </table:table-cell>
          <table:table-cell/>
          <table:table-cell table:style-name="ce13"/>
          <table:table-cell table:style-name="ce13" table:formula="of:=AVERAGE([.I28:.I37])" office:value-type="percentage" office:value="0.02504" calcext:value-type="percentage">
            <text:p>2,50%</text:p>
          </table:table-cell>
          <table:table-cell table:style-name="ce13" table:formula="of:=AVERAGE([.J28:.J37])" office:value-type="percentage" office:value="0.01978" calcext:value-type="percentage">
            <text:p>1,98%</text:p>
          </table:table-cell>
          <table:table-cell table:style-name="ce13" table:formula="of:=AVERAGE([.K28:.K37])" office:value-type="percentage" office:value="0.01544" calcext:value-type="percentage">
            <text:p>1,54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85" calcext:value-type="percentage">
            <text:p>0,85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55" calcext:value-type="percentage">
            <text:p>1,55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08" calcext:value-type="percentage">
            <text:p>1,08%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9" calcext:value-type="percentage">
            <text:p>1,89%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634" calcext:value-type="percentage">
            <text:p>2,63%</text:p>
          </table:table-cell>
          <table:table-cell table:style-name="ce13" table:formula="of:=AVERAGE([.C41:.C50])" office:value-type="percentage" office:value="0.0197" calcext:value-type="percentage">
            <text:p>1,97%</text:p>
          </table:table-cell>
          <table:table-cell table:style-name="ce13" table:formula="of:=AVERAGE([.D41:.D50])" office:value-type="percentage" office:value="0.01377" calcext:value-type="percentage">
            <text:p>1,38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372" calcext:value-type="percentage">
            <text:p>0,3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BF" table:style-name="ta1">
        <table:table-column table:style-name="co6" table:default-cell-style-name="Default"/>
        <table:table-column table:style-name="co6" table:number-columns-repeated="10" table:default-cell-style-name="ce18"/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051" calcext:value-type="percentage">
            <text:p>20,51%</text:p>
          </table:table-cell>
          <table:table-cell table:style-name="ce16" office:value-type="percentage" office:value="0.177" calcext:value-type="percentage">
            <text:p>17,7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 office:value-type="percentage" office:value="0.141" calcext:value-type="percentage">
            <text:p>14,10%</text:p>
          </table:table-cell>
          <table:table-cell office:value-type="percentage" office:value="0.1496" calcext:value-type="percentage">
            <text:p>14,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1532" calcext:value-type="percentage">
            <text:p>15,32%</text:p>
          </table:table-cell>
          <table:table-cell table:style-name="ce16" office:value-type="percentage" office:value="0.1257" calcext:value-type="percentage">
            <text:p>12,5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093" calcext:value-type="percentage">
            <text:p>10,9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507" calcext:value-type="percentage">
            <text:p>15,07%</text:p>
          </table:table-cell>
          <table:table-cell table:style-name="ce16" office:value-type="percentage" office:value="0.1068" calcext:value-type="percentage">
            <text:p>10,68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1534" calcext:value-type="percentage">
            <text:p>15,34%</text:p>
          </table:table-cell>
          <table:table-cell office:value-type="percentage" office:value="0.1336" calcext:value-type="percentage">
            <text:p>13,36%</text:p>
          </table:table-cell>
          <table:table-cell table:style-name="ce16" office:value-type="percentage" office:value="0.1198" calcext:value-type="percentage">
            <text:p>11,98%</text:p>
          </table:table-cell>
          <table:table-cell office:value-type="percentage" office:value="0.1001" calcext:value-type="percentage">
            <text:p>10,01%</text:p>
          </table:table-cell>
          <table:table-cell table:number-columns-repeated="2" office:value-type="percentage" office:value="0.0942" calcext:value-type="percentage">
            <text:p>9,42%</text:p>
          </table:table-cell>
          <table:table-cell office:value-type="percentage" office:value="0.0956" calcext:value-type="percentage">
            <text:p>9,5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1332" calcext:value-type="percentage">
            <text:p>13,32%</text:p>
          </table:table-cell>
          <table:table-cell table:style-name="ce16" office:value-type="percentage" office:value="0.1046" calcext:value-type="percentage">
            <text:p>10,46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45" calcext:value-type="percentage">
            <text:p>9,45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6" calcext:value-type="percentage">
            <text:p>9,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39" calcext:value-type="percentage">
            <text:p>13,90%</text:p>
          </table:table-cell>
          <table:table-cell table:style-name="ce16" office:value-type="percentage" office:value="0.1208" calcext:value-type="percentage">
            <text:p>12,08%</text:p>
          </table:table-cell>
          <table:table-cell office:value-type="percentage" office:value="0.1164" calcext:value-type="percentage">
            <text:p>11,64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1261" calcext:value-type="percentage">
            <text:p>12,61%</text:p>
          </table:table-cell>
          <table:table-cell table:style-name="ce16" office:value-type="percentage" office:value="0.1084" calcext:value-type="percentage">
            <text:p>10,84%</text:p>
          </table:table-cell>
          <table:table-cell office:value-type="percentage" office:value="0.0996" calcext:value-type="percentage">
            <text:p>9,96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63" calcext:value-type="percentage">
            <text:p>8,6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265" calcext:value-type="percentage">
            <text:p>12,65%</text:p>
          </table:table-cell>
          <table:table-cell table:style-name="ce16" office:value-type="percentage" office:value="0.117" calcext:value-type="percentage">
            <text:p>11,70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6" calcext:value-type="percentage">
            <text:p>9,6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603" calcext:value-type="percentage">
            <text:p>16,03%</text:p>
          </table:table-cell>
          <table:table-cell table:style-name="ce16" office:value-type="percentage" office:value="0.1433" calcext:value-type="percentage">
            <text:p>14,33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271" calcext:value-type="percentage">
            <text:p>12,71%</text:p>
          </table:table-cell>
          <table:table-cell table:style-name="ce16" office:value-type="percentage" office:value="0.1192" calcext:value-type="percentage">
            <text:p>11,92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41" calcext:value-type="percentage">
            <text:p>10,41%</text:p>
          </table:table-cell>
          <table:table-cell office:value-type="percentage" office:value="0.0981" calcext:value-type="percentage">
            <text:p>9,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:.B11])" office:value-type="percentage" office:value="0.15925" calcext:value-type="percentage">
            <text:p>15,93%</text:p>
          </table:table-cell>
          <table:table-cell table:style-name="ce17" table:formula="of:=AVERAGE([.C2:.C11])" office:value-type="percentage" office:value="0.14548" calcext:value-type="percentage">
            <text:p>14,55%</text:p>
          </table:table-cell>
          <table:table-cell table:style-name="ce17" table:formula="of:=AVERAGE([.D2:.D11])" office:value-type="percentage" office:value="0.12426" calcext:value-type="percentage">
            <text:p>12,43%</text:p>
          </table:table-cell>
          <table:table-cell table:style-name="ce17" table:formula="of:=AVERAGE([.E2:.E11])" office:value-type="percentage" office:value="0.11497" calcext:value-type="percentage">
            <text:p>11,50%</text:p>
          </table:table-cell>
          <table:table-cell table:style-name="ce17" table:formula="of:=AVERAGE([.F2:.F11])" office:value-type="percentage" office:value="0.10767" calcext:value-type="percentage">
            <text:p>10,77%</text:p>
          </table:table-cell>
          <table:table-cell table:style-name="ce17" table:formula="of:=AVERAGE([.G2:.G11])" office:value-type="percentage" office:value="0.10553" calcext:value-type="percentage">
            <text:p>10,55%</text:p>
          </table:table-cell>
          <table:table-cell table:style-name="ce17" table:formula="of:=AVERAGE([.H2:.H11])" office:value-type="percentage" office:value="0.10412" calcext:value-type="percentage">
            <text:p>10,41%</text:p>
          </table:table-cell>
          <table:table-cell table:style-name="ce13"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</text:p>
          </table:table-cell>
          <table:table-cell office:value-type="percentage" office:value="0.4499" calcext:value-type="percentage">
            <text:p>44,99%</text:p>
          </table:table-cell>
          <table:table-cell office:value-type="percentage" office:value="0.2207" calcext:value-type="percentage">
            <text:p>22,07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2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1572" calcext:value-type="percentage">
            <text:p>15,72%</text:p>
          </table:table-cell>
          <table:table-cell table:style-name="ce16" office:value-type="percentage" office:value="0.0376" calcext:value-type="percentage">
            <text:p>3,76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274" calcext:value-type="percentage">
            <text:p>2,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3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1627" calcext:value-type="percentage">
            <text:p>16,27%</text:p>
          </table:table-cell>
          <table:table-cell table:style-name="ce16" office:value-type="percentage" office:value="0.0449" calcext:value-type="percentage">
            <text:p>4,49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4" calcext:value-type="percentage">
            <text:p>2,84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4</text:p>
          </table:table-cell>
          <table:table-cell office:value-type="percentage" office:value="0.5008" calcext:value-type="percentage">
            <text:p>50,08%</text:p>
          </table:table-cell>
          <table:table-cell office:value-type="percentage" office:value="0.1613" calcext:value-type="percentage">
            <text:p>16,13%</text:p>
          </table:table-cell>
          <table:table-cell table:style-name="ce16" office:value-type="percentage" office:value="0.0484" calcext:value-type="percentage">
            <text:p>4,84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95" calcext:value-type="percentage">
            <text:p>2,95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147" calcext:value-type="percentage">
            <text:p>14,7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5</text:p>
          </table:table-cell>
          <table:table-cell office:value-type="percentage" office:value="0.4374" calcext:value-type="percentage">
            <text:p>43,74%</text:p>
          </table:table-cell>
          <table:table-cell office:value-type="percentage" office:value="0.147" calcext:value-type="percentage">
            <text:p>14,70%</text:p>
          </table:table-cell>
          <table:table-cell table:style-name="ce16" office:value-type="percentage" office:value="0.0346" calcext:value-type="percentage">
            <text:p>3,46%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6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1791" calcext:value-type="percentage">
            <text:p>17,91%</text:p>
          </table:table-cell>
          <table:table-cell table:style-name="ce16" office:value-type="percentage" office:value="0.0522" calcext:value-type="percentage">
            <text:p>5,22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7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1317" calcext:value-type="percentage">
            <text:p>13,17%</text:p>
          </table:table-cell>
          <table:table-cell table:style-name="ce16" office:value-type="percentage" office:value="0.0405" calcext:value-type="percentage">
            <text:p>4,0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2151" calcext:value-type="percentage">
            <text:p>21,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8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1342" calcext:value-type="percentage">
            <text:p>13,42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37" calcext:value-type="percentage">
            <text:p>3,37%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9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1353" calcext:value-type="percentage">
            <text:p>13,53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299" calcext:value-type="percentage">
            <text:p>2,99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1168" calcext:value-type="percentage">
            <text:p>11,68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0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1319" calcext:value-type="percentage">
            <text:p>13,19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2444" calcext:value-type="percentage">
            <text:p>24,4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15:.B24])" office:value-type="percentage" office:value="0.47999" calcext:value-type="percentage">
            <text:p>48,00%</text:p>
          </table:table-cell>
          <table:table-cell table:style-name="ce17" table:formula="of:=AVERAGE([.C15:.C24])" office:value-type="percentage" office:value="0.15611" calcext:value-type="percentage">
            <text:p>15,61%</text:p>
          </table:table-cell>
          <table:table-cell table:style-name="ce17" table:formula="of:=AVERAGE([.D15:.D24])" office:value-type="percentage" office:value="0.04342" calcext:value-type="percentage">
            <text:p>4,34%</text:p>
          </table:table-cell>
          <table:table-cell table:style-name="ce17" table:formula="of:=AVERAGE([.E15:.E24])" office:value-type="percentage" office:value="0.03338" calcext:value-type="percentage">
            <text:p>3,34%</text:p>
          </table:table-cell>
          <table:table-cell table:style-name="ce17" table:formula="of:=AVERAGE([.F15:.F24])" office:value-type="percentage" office:value="0.02979" calcext:value-type="percentage">
            <text:p>2,98%</text:p>
          </table:table-cell>
          <table:table-cell table:style-name="ce17" table:formula="of:=AVERAGE([.G15:.G24])" office:value-type="percentage" office:value="0.09059" calcext:value-type="percentage">
            <text:p>9,06%</text:p>
          </table:table-cell>
          <table:table-cell table:style-name="ce17" table:formula="of:=AVERAGE([.H15:.H24])" office:value-type="percentage" office:value="0.18686" calcext:value-type="percentage">
            <text:p>18,69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4458" calcext:value-type="percentage">
            <text:p>44,58%</text:p>
          </table:table-cell>
          <table:table-cell office:value-type="percentage" office:value="0.4147" calcext:value-type="percentage">
            <text:p>41,47%</text:p>
          </table:table-cell>
          <table:table-cell table:style-name="ce16" office:value-type="percentage" office:value="0.0695" calcext:value-type="percentage">
            <text:p>6,95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28" calcext:value-type="percentage">
            <text:p>2,8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061" calcext:value-type="percentage">
            <text:p>40,61%</text:p>
          </table:table-cell>
          <table:table-cell table:style-name="ce16" office:value-type="percentage" office:value="0.0771" calcext:value-type="percentage">
            <text:p>7,71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296" calcext:value-type="percentage">
            <text:p>2,96%</text:p>
          </table:table-cell>
          <table:table-cell office:value-type="percentage" office:value="0.0283" calcext:value-type="percentage">
            <text:p>2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3706" calcext:value-type="percentage">
            <text:p>37,06%</text:p>
          </table:table-cell>
          <table:table-cell table:style-name="ce16" office:value-type="percentage" office:value="0.0768" calcext:value-type="percentage">
            <text:p>7,68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71" calcext:value-type="percentage">
            <text:p>3,7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3523" calcext:value-type="percentage">
            <text:p>35,23%</text:p>
          </table:table-cell>
          <table:table-cell table:style-name="ce16" office:value-type="percentage" office:value="0.0765" calcext:value-type="percentage">
            <text:p>7,65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345" calcext:value-type="percentage">
            <text:p>3,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3717" calcext:value-type="percentage">
            <text:p>37,17%</text:p>
          </table:table-cell>
          <table:table-cell table:style-name="ce16" office:value-type="percentage" office:value="0.0705" calcext:value-type="percentage">
            <text:p>7,05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287" calcext:value-type="percentage">
            <text:p>2,8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697" calcext:value-type="percentage">
            <text:p>36,97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281" calcext:value-type="percentage">
            <text:p>2,8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4489" calcext:value-type="percentage">
            <text:p>44,89%</text:p>
          </table:table-cell>
          <table:table-cell office:value-type="percentage" office:value="0.3919" calcext:value-type="percentage">
            <text:p>39,19%</text:p>
          </table:table-cell>
          <table:table-cell table:style-name="ce16" office:value-type="percentage" office:value="0.08" calcext:value-type="percentage">
            <text:p>8,00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299" calcext:value-type="percentage">
            <text:p>2,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3627" calcext:value-type="percentage">
            <text:p>36,27%</text:p>
          </table:table-cell>
          <table:table-cell table:style-name="ce16" office:value-type="percentage" office:value="0.0559" calcext:value-type="percentage">
            <text:p>5,59%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9" calcext:value-type="percentage">
            <text:p>2,8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" calcext:value-type="percentage">
            <text:p>41,00%</text:p>
          </table:table-cell>
          <table:table-cell table:style-name="ce16" office:value-type="percentage" office:value="0.0703" calcext:value-type="percentage">
            <text:p>7,03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83" calcext:value-type="percentage">
            <text:p>3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3778" calcext:value-type="percentage">
            <text:p>37,78%</text:p>
          </table:table-cell>
          <table:table-cell table:style-name="ce16" office:value-type="percentage" office:value="0.052" calcext:value-type="percentage">
            <text:p>5,20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14" calcext:value-type="percentage">
            <text:p>3,1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8:.B37])" office:value-type="percentage" office:value="0.43594" calcext:value-type="percentage">
            <text:p>43,59%</text:p>
          </table:table-cell>
          <table:table-cell table:style-name="ce17" table:formula="of:=AVERAGE([.C28:.C37])" office:value-type="percentage" office:value="0.38275" calcext:value-type="percentage">
            <text:p>38,28%</text:p>
          </table:table-cell>
          <table:table-cell table:style-name="ce17" table:formula="of:=AVERAGE([.D28:.D37])" office:value-type="percentage" office:value="0.07091" calcext:value-type="percentage">
            <text:p>7,09%</text:p>
          </table:table-cell>
          <table:table-cell table:style-name="ce17" table:formula="of:=AVERAGE([.E28:.E37])" office:value-type="percentage" office:value="0.04791" calcext:value-type="percentage">
            <text:p>4,79%</text:p>
          </table:table-cell>
          <table:table-cell table:style-name="ce17" table:formula="of:=AVERAGE([.F28:.F37])" office:value-type="percentage" office:value="0.04058" calcext:value-type="percentage">
            <text:p>4,06%</text:p>
          </table:table-cell>
          <table:table-cell table:style-name="ce17" table:formula="of:=AVERAGE([.G28:.G37])" office:value-type="percentage" office:value="0.03333" calcext:value-type="percentage">
            <text:p>3,33%</text:p>
          </table:table-cell>
          <table:table-cell table:style-name="ce17" table:formula="of:=AVERAGE([.H28:.H37])" office:value-type="percentage" office:value="0.03132" calcext:value-type="percentage">
            <text:p>3,13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677" calcext:value-type="percentage">
            <text:p>36,77%</text:p>
          </table:table-cell>
          <table:table-cell table:style-name="ce16" office:value-type="percentage" office:value="0.309" calcext:value-type="percentage">
            <text:p>30,90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2924" calcext:value-type="percentage">
            <text:p>29,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2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3646" calcext:value-type="percentage">
            <text:p>36,46%</text:p>
          </table:table-cell>
          <table:table-cell table:style-name="ce16" office:value-type="percentage" office:value="0.3489" calcext:value-type="percentage">
            <text:p>34,89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3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3625" calcext:value-type="percentage">
            <text:p>36,25%</text:p>
          </table:table-cell>
          <table:table-cell table:style-name="ce16" office:value-type="percentage" office:value="0.3139" calcext:value-type="percentage">
            <text:p>31,39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4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754" calcext:value-type="percentage">
            <text:p>37,54%</text:p>
          </table:table-cell>
          <table:table-cell table:style-name="ce16" office:value-type="percentage" office:value="0.3054" calcext:value-type="percentage">
            <text:p>30,54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1966" calcext:value-type="percentage">
            <text:p>19,66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5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963" calcext:value-type="percentage">
            <text:p>39,63%</text:p>
          </table:table-cell>
          <table:table-cell table:style-name="ce16" office:value-type="percentage" office:value="0.2928" calcext:value-type="percentage">
            <text:p>29,2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252" calcext:value-type="percentage">
            <text:p>25,20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6</text:p>
          </table:table-cell>
          <table:table-cell office:value-type="percentage" office:value="0.3541" calcext:value-type="percentage">
            <text:p>35,41%</text:p>
          </table:table-cell>
          <table:table-cell office:value-type="percentage" office:value="0.3845" calcext:value-type="percentage">
            <text:p>38,45%</text:p>
          </table:table-cell>
          <table:table-cell table:style-name="ce16" office:value-type="percentage" office:value="0.2833" calcext:value-type="percentage">
            <text:p>28,3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2025" calcext:value-type="percentage">
            <text:p>20,2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98" calcext:value-type="percentage">
            <text:p>37,98%</text:p>
          </table:table-cell>
          <table:table-cell table:style-name="ce16" office:value-type="percentage" office:value="0.2662" calcext:value-type="percentage">
            <text:p>26,62%</text:p>
          </table:table-cell>
          <table:table-cell office:value-type="percentage" office:value="0.1997" calcext:value-type="percentage">
            <text:p>19,97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8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087" calcext:value-type="percentage">
            <text:p>40,87%</text:p>
          </table:table-cell>
          <table:table-cell table:style-name="ce16" office:value-type="percentage" office:value="0.3029" calcext:value-type="percentage">
            <text:p>30,29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9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871" calcext:value-type="percentage">
            <text:p>38,71%</text:p>
          </table:table-cell>
          <table:table-cell table:style-name="ce16" office:value-type="percentage" office:value="0.2972" calcext:value-type="percentage">
            <text:p>29,72%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166" calcext:value-type="percentage">
            <text:p>11,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0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3669" calcext:value-type="percentage">
            <text:p>36,69%</text:p>
          </table:table-cell>
          <table:table-cell table:style-name="ce16" office:value-type="percentage" office:value="0.2961" calcext:value-type="percentage">
            <text:p>29,6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41:.B50])" office:value-type="percentage" office:value="0.35807" calcext:value-type="percentage">
            <text:p>35,81%</text:p>
          </table:table-cell>
          <table:table-cell table:style-name="ce17" table:formula="of:=AVERAGE([.C41:.C50])" office:value-type="percentage" office:value="0.37935" calcext:value-type="percentage">
            <text:p>37,94%</text:p>
          </table:table-cell>
          <table:table-cell table:style-name="ce17" table:formula="of:=AVERAGE([.D41:.D50])" office:value-type="percentage" office:value="0.30157" calcext:value-type="percentage">
            <text:p>30,16%</text:p>
          </table:table-cell>
          <table:table-cell table:style-name="ce17" table:formula="of:=AVERAGE([.E41:.E50])" office:value-type="percentage" office:value="0.17594" calcext:value-type="percentage">
            <text:p>17,59%</text:p>
          </table:table-cell>
          <table:table-cell table:style-name="ce17" table:formula="of:=AVERAGE([.F41:.F50])" office:value-type="percentage" office:value="0.19931" calcext:value-type="percentage">
            <text:p>19,93%</text:p>
          </table:table-cell>
          <table:table-cell table:style-name="ce17" table:formula="of:=AVERAGE([.G41:.G50])" office:value-type="percentage" office:value="0.21692" calcext:value-type="percentage">
            <text:p>21,69%</text:p>
          </table:table-cell>
          <table:table-cell table:style-name="ce17" table:formula="of:=AVERAGE([.H41:.H50])" office:value-type="percentage" office:value="0.21213" calcext:value-type="percentage">
            <text:p>21,2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3244" calcext:value-type="percentage">
            <text:p>32,44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79" calcext:value-type="percentage">
            <text:p>2,7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3361" calcext:value-type="percentage">
            <text:p>33,6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317" calcext:value-type="percentage">
            <text:p>33,1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46" calcext:value-type="percentage">
            <text:p>2,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3452" calcext:value-type="percentage">
            <text:p>34,52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05" calcext:value-type="percentage">
            <text:p>3,0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6085" calcext:value-type="percentage">
            <text:p>60,85%</text:p>
          </table:table-cell>
          <table:table-cell office:value-type="percentage" office:value="0.3348" calcext:value-type="percentage">
            <text:p>33,48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64" calcext:value-type="percentage">
            <text:p>2,64%</text:p>
          </table:table-cell>
          <table:table-cell office:value-type="percentage" office:value="0.0251" calcext:value-type="percentage">
            <text:p>2,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5934" calcext:value-type="percentage">
            <text:p>59,34%</text:p>
          </table:table-cell>
          <table:table-cell office:value-type="percentage" office:value="0.3476" calcext:value-type="percentage">
            <text:p>34,76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205" calcext:value-type="percentage">
            <text:p>2,05%</text:p>
          </table:table-cell>
          <table:table-cell office:value-type="percentage" office:value="0.0204" calcext:value-type="percentage">
            <text:p>2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784" calcext:value-type="percentage">
            <text:p>37,8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3" calcext:value-type="percentage">
            <text:p>2,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6324" calcext:value-type="percentage">
            <text:p>63,24%</text:p>
          </table:table-cell>
          <table:table-cell office:value-type="percentage" office:value="0.3246" calcext:value-type="percentage">
            <text:p>32,46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2357" calcext:value-type="percentage">
            <text:p>23,57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84" calcext:value-type="percentage">
            <text:p>3,8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2705" calcext:value-type="percentage">
            <text:p>27,05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81" calcext:value-type="percentage">
            <text:p>3,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54:.B63])" office:value-type="percentage" office:value="0.60686" calcext:value-type="percentage">
            <text:p>60,69%</text:p>
          </table:table-cell>
          <table:table-cell table:style-name="ce17" table:formula="of:=AVERAGE([.C54:.C63])" office:value-type="percentage" office:value="0.3229" calcext:value-type="percentage">
            <text:p>32,29%</text:p>
          </table:table-cell>
          <table:table-cell table:style-name="ce17" table:formula="of:=AVERAGE([.D54:.D63])" office:value-type="percentage" office:value="0.07615" calcext:value-type="percentage">
            <text:p>7,62%</text:p>
          </table:table-cell>
          <table:table-cell table:style-name="ce17" table:formula="of:=AVERAGE([.E54:.E63])" office:value-type="percentage" office:value="0.04348" calcext:value-type="percentage">
            <text:p>4,35%</text:p>
          </table:table-cell>
          <table:table-cell table:style-name="ce17" table:formula="of:=AVERAGE([.F54:.F63])" office:value-type="percentage" office:value="0.03396" calcext:value-type="percentage">
            <text:p>3,40%</text:p>
          </table:table-cell>
          <table:table-cell table:style-name="ce17" table:formula="of:=AVERAGE([.G54:.G63])" office:value-type="percentage" office:value="0.02963" calcext:value-type="percentage">
            <text:p>2,96%</text:p>
          </table:table-cell>
          <table:table-cell table:style-name="ce17" table:formula="of:=AVERAGE([.H54:.H63])" office:value-type="percentage" office:value="0.02808" calcext:value-type="percentage">
            <text:p>2,8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</text:p>
          </table:table-cell>
          <table:table-cell office:value-type="percentage" office:value="0.5474" calcext:value-type="percentage">
            <text:p>54,74%</text:p>
          </table:table-cell>
          <table:table-cell office:value-type="percentage" office:value="0.4107" calcext:value-type="percentage">
            <text:p>41,07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09" calcext:value-type="percentage">
            <text:p>7,0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2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321" calcext:value-type="percentage">
            <text:p>43,2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73" calcext:value-type="percentage">
            <text:p>6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3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4119" calcext:value-type="percentage">
            <text:p>41,19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41" calcext:value-type="percentage">
            <text:p>7,4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4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397" calcext:value-type="percentage">
            <text:p>39,70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938" calcext:value-type="percentage">
            <text:p>9,3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672" calcext:value-type="percentage">
            <text:p>6,7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5</text:p>
          </table:table-cell>
          <table:table-cell office:value-type="percentage" office:value="0.5669" calcext:value-type="percentage">
            <text:p>56,69%</text:p>
          </table:table-cell>
          <table:table-cell office:value-type="percentage" office:value="0.3959" calcext:value-type="percentage">
            <text:p>39,59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73" calcext:value-type="percentage">
            <text:p>5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6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823" calcext:value-type="percentage">
            <text:p>38,23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7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417" calcext:value-type="percentage">
            <text:p>41,70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604" calcext:value-type="percentage">
            <text:p>6,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8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3853" calcext:value-type="percentage">
            <text:p>38,53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11" calcext:value-type="percentage">
            <text:p>6,1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9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3908" calcext:value-type="percentage">
            <text:p>39,08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1212" calcext:value-type="percentage">
            <text:p>12,12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577" calcext:value-type="percentage">
            <text:p>5,7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0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4231" calcext:value-type="percentage">
            <text:p>42,31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95" calcext:value-type="percentage">
            <text:p>6,95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67:.B76])" office:value-type="percentage" office:value="0.55607" calcext:value-type="percentage">
            <text:p>55,61%</text:p>
          </table:table-cell>
          <table:table-cell table:style-name="ce17" table:formula="of:=AVERAGE([.C67:.C76])" office:value-type="percentage" office:value="0.40461" calcext:value-type="percentage">
            <text:p>40,46%</text:p>
          </table:table-cell>
          <table:table-cell table:style-name="ce17" table:formula="of:=AVERAGE([.D67:.D76])" office:value-type="percentage" office:value="0.07615" calcext:value-type="percentage">
            <text:p>7,62%</text:p>
          </table:table-cell>
          <table:table-cell table:style-name="ce17" table:formula="of:=AVERAGE([.E67:.E76])" office:value-type="percentage" office:value="0.0965" calcext:value-type="percentage">
            <text:p>9,65%</text:p>
          </table:table-cell>
          <table:table-cell table:style-name="ce17" table:formula="of:=AVERAGE([.F67:.F76])" office:value-type="percentage" office:value="0.07742" calcext:value-type="percentage">
            <text:p>7,74%</text:p>
          </table:table-cell>
          <table:table-cell table:style-name="ce17" table:formula="of:=AVERAGE([.G67:.G76])" office:value-type="percentage" office:value="0.06919" calcext:value-type="percentage">
            <text:p>6,92%</text:p>
          </table:table-cell>
          <table:table-cell table:style-name="ce17" table:formula="of:=AVERAGE([.H67:.H76])" office:value-type="percentage" office:value="0.06441" calcext:value-type="percentage">
            <text:p>6,44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098" calcext:value-type="percentage">
            <text:p>40,98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714" calcext:value-type="percentage">
            <text:p>7,1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5615" calcext:value-type="percentage">
            <text:p>56,15%</text:p>
          </table:table-cell>
          <table:table-cell office:value-type="percentage" office:value="0.4055" calcext:value-type="percentage">
            <text:p>40,5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0484" calcext:value-type="percentage">
            <text:p>4,8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4397" calcext:value-type="percentage">
            <text:p>43,9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917" calcext:value-type="percentage">
            <text:p>9,1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5509" calcext:value-type="percentage">
            <text:p>55,09%</text:p>
          </table:table-cell>
          <table:table-cell office:value-type="percentage" office:value="0.4893" calcext:value-type="percentage">
            <text:p>48,93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1399" calcext:value-type="percentage">
            <text:p>13,99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299" calcext:value-type="percentage">
            <text:p>12,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5371" calcext:value-type="percentage">
            <text:p>53,71%</text:p>
          </table:table-cell>
          <table:table-cell office:value-type="percentage" office:value="0.4431" calcext:value-type="percentage">
            <text:p>44,31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896" calcext:value-type="percentage">
            <text:p>8,96%</text:p>
          </table:table-cell>
          <table:table-cell office:value-type="percentage" office:value="0.0994" calcext:value-type="percentage">
            <text:p>9,9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698" calcext:value-type="percentage">
            <text:p>46,98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3" calcext:value-type="percentage">
            <text:p>8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4504" calcext:value-type="percentage">
            <text:p>45,0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499" calcext:value-type="percentage">
            <text:p>4,99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642" calcext:value-type="percentage">
            <text:p>6,4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5743" calcext:value-type="percentage">
            <text:p>57,43%</text:p>
          </table:table-cell>
          <table:table-cell office:value-type="percentage" office:value="0.461" calcext:value-type="percentage">
            <text:p>46,10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773" calcext:value-type="percentage">
            <text:p>7,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4625" calcext:value-type="percentage">
            <text:p>46,2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564" calcext:value-type="percentage">
            <text:p>5,6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55" calcext:value-type="percentage">
            <text:p>5,5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5541" calcext:value-type="percentage">
            <text:p>55,41%</text:p>
          </table:table-cell>
          <table:table-cell office:value-type="percentage" office:value="0.4887" calcext:value-type="percentage">
            <text:p>48,87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608" calcext:value-type="percentage">
            <text:p>6,08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79:.B88])" office:value-type="percentage" office:value="0.55624" calcext:value-type="percentage">
            <text:p>55,62%</text:p>
          </table:table-cell>
          <table:table-cell table:style-name="ce17" table:formula="of:=AVERAGE([.C79:.C88])" office:value-type="percentage" office:value="0.45198" calcext:value-type="percentage">
            <text:p>45,20%</text:p>
          </table:table-cell>
          <table:table-cell table:style-name="ce17" table:formula="of:=AVERAGE([.D79:.D88])" office:value-type="percentage" office:value="0.07615" calcext:value-type="percentage">
            <text:p>7,62%</text:p>
          </table:table-cell>
          <table:table-cell table:style-name="ce17" table:formula="of:=AVERAGE([.E79:.E88])" office:value-type="percentage" office:value="0.07" calcext:value-type="percentage">
            <text:p>7,00%</text:p>
          </table:table-cell>
          <table:table-cell table:style-name="ce17" table:formula="of:=AVERAGE([.F79:.F88])" office:value-type="percentage" office:value="0.07539" calcext:value-type="percentage">
            <text:p>7,54%</text:p>
          </table:table-cell>
          <table:table-cell table:style-name="ce17" table:formula="of:=AVERAGE([.G79:.G88])" office:value-type="percentage" office:value="0.06774" calcext:value-type="percentage">
            <text:p>6,77%</text:p>
          </table:table-cell>
          <table:table-cell table:style-name="ce17" table:formula="of:=AVERAGE([.H79:.H88])" office:value-type="percentage" office:value="0.07869" calcext:value-type="percentage">
            <text:p>7,87%</text:p>
          </table:table-cell>
          <table:table-cell table:number-columns-repeated="3"/>
        </table:table-row>
        <table:table-row table:style-name="ro2" table:number-rows-repeated="104848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Φύλλο11" table:style-name="ta1">
        <table:shapes>
          <draw:frame draw:z-index="0" draw:style-name="gr1" draw:text-style-name="P1" svg:width="15.999cm" svg:height="8.999cm" svg:x="9.132cm" svg:y="2.528cm">
            <draw:object draw:notify-on-update-of-ranges="Φύλλο11.C16:Φύλλο11.C20 Φύλλο11.D15:Φύλλο11.D15 Φύλλο11.D16:Φύλλο1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16384" table:default-cell-style-name="Default"/>
        <table:table-row table:style-name="ro2">
          <table:table-cell/>
          <table:table-cell office:value-type="string" calcext:value-type="string">
            <text:p>Nc=50</text:p>
          </table:table-cell>
          <table:table-cell office:value-type="string" calcext:value-type="string">
            <text:p>Nc=100</text:p>
          </table:table-cell>
          <table:table-cell office:value-type="string" calcext:value-type="string">
            <text:p>Nc=200</text:p>
          </table:table-cell>
          <table:table-cell office:value-type="string" calcext:value-type="string">
            <text:p>Nc=500</text:p>
          </table:table-cell>
          <table:table-cell office:value-type="string" calcext:value-type="string">
            <text:p>Nc=10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etown</text:p>
          </table:table-cell>
          <table:table-cell office:value-type="float" office:value="19.889" calcext:value-type="float">
            <text:p>19,889</text:p>
          </table:table-cell>
          <table:table-cell office:value-type="float" office:value="42.209" calcext:value-type="float">
            <text:p>42,209</text:p>
          </table:table-cell>
          <table:table-cell office:value-type="float" office:value="102.699" calcext:value-type="float">
            <text:p>102,699</text:p>
          </table:table-cell>
          <table:table-cell office:value-type="float" office:value="166.122" calcext:value-type="float">
            <text:p>166,122</text:p>
          </table:table-cell>
          <table:table-cell office:value-type="float" office:value="372.803" calcext:value-type="float">
            <text:p>372,8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22.32" calcext:value-type="float">
            <text:p>22,32</text:p>
          </table:table-cell>
          <table:table-cell office:value-type="float" office:value="32.979" calcext:value-type="float">
            <text:p>32,979</text:p>
          </table:table-cell>
          <table:table-cell office:value-type="float" office:value="67.897" calcext:value-type="float">
            <text:p>67,897</text:p>
          </table:table-cell>
          <table:table-cell office:value-type="float" office:value="261.429" calcext:value-type="float">
            <text:p>261,429</text:p>
          </table:table-cell>
          <table:table-cell office:value-type="float" office:value="429.818" calcext:value-type="float">
            <text:p>429,8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23.45" calcext:value-type="float">
            <text:p>23,45</text:p>
          </table:table-cell>
          <table:table-cell office:value-type="float" office:value="40.348" calcext:value-type="float">
            <text:p>40,348</text:p>
          </table:table-cell>
          <table:table-cell office:value-type="float" office:value="89.974" calcext:value-type="float">
            <text:p>89,974</text:p>
          </table:table-cell>
          <table:table-cell office:value-type="float" office:value="221.786" calcext:value-type="float">
            <text:p>221,786</text:p>
          </table:table-cell>
          <table:table-cell office:value-type="float" office:value="466.486" calcext:value-type="float">
            <text:p>466,4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ongo</text:p>
          </table:table-cell>
          <table:table-cell office:value-type="float" office:value="21.657" calcext:value-type="float">
            <text:p>21,657</text:p>
          </table:table-cell>
          <table:table-cell office:value-type="float" office:value="42.369" calcext:value-type="float">
            <text:p>42,369</text:p>
          </table:table-cell>
          <table:table-cell office:value-type="float" office:value="94.031" calcext:value-type="float">
            <text:p>94,031</text:p>
          </table:table-cell>
          <table:table-cell office:value-type="float" office:value="268.385" calcext:value-type="float">
            <text:p>268,385</text:p>
          </table:table-cell>
          <table:table-cell office:value-type="float" office:value="494.985" calcext:value-type="float">
            <text:p>494,9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abia</text:p>
          </table:table-cell>
          <table:table-cell office:value-type="float" office:value="18.6" calcext:value-type="float">
            <text:p>18,6</text:p>
          </table:table-cell>
          <table:table-cell office:value-type="float" office:value="41.678" calcext:value-type="float">
            <text:p>41,678</text:p>
          </table:table-cell>
          <table:table-cell office:value-type="float" office:value="110.936" calcext:value-type="float">
            <text:p>110,936</text:p>
          </table:table-cell>
          <table:table-cell office:value-type="float" office:value="228.737" calcext:value-type="float">
            <text:p>228,737</text:p>
          </table:table-cell>
          <table:table-cell office:value-type="float" office:value="482.036" calcext:value-type="float">
            <text:p>482,0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valbard</text:p>
          </table:table-cell>
          <table:table-cell office:value-type="float" office:value="18.131" calcext:value-type="float">
            <text:p>18,131</text:p>
          </table:table-cell>
          <table:table-cell office:value-type="float" office:value="38.153" calcext:value-type="float">
            <text:p>38,153</text:p>
          </table:table-cell>
          <table:table-cell office:value-type="float" office:value="99.646" calcext:value-type="float">
            <text:p>99,646</text:p>
          </table:table-cell>
          <table:table-cell office:value-type="float" office:value="263.817" calcext:value-type="float">
            <text:p>263,817</text:p>
          </table:table-cell>
          <table:table-cell office:value-type="float" office:value="599.473" calcext:value-type="float">
            <text:p>599,4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1.718" calcext:value-type="float">
            <text:p>21,718</text:p>
          </table:table-cell>
          <table:table-cell office:value-type="float" office:value="33.772" calcext:value-type="float">
            <text:p>33,772</text:p>
          </table:table-cell>
          <table:table-cell office:value-type="float" office:value="93.553" calcext:value-type="float">
            <text:p>93,553</text:p>
          </table:table-cell>
          <table:table-cell office:value-type="float" office:value="252.741" calcext:value-type="float">
            <text:p>252,741</text:p>
          </table:table-cell>
          <table:table-cell office:value-type="float" office:value="430.321" calcext:value-type="float">
            <text:p>430,32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9" table:formula="of:=AVERAGE([.B2:.B8])" office:value-type="float" office:value="20.8235714285714" calcext:value-type="float">
            <text:p>20,8235714285714</text:p>
          </table:table-cell>
          <table:table-cell table:style-name="ce9" table:formula="of:=AVERAGE([.C2:.C8])" office:value-type="float" office:value="38.7868571428571" calcext:value-type="float">
            <text:p>38,7868571428571</text:p>
          </table:table-cell>
          <table:table-cell table:style-name="ce9" table:formula="of:=AVERAGE([.D2:.D8])" office:value-type="float" office:value="94.1051428571429" calcext:value-type="float">
            <text:p>94,1051428571429</text:p>
          </table:table-cell>
          <table:table-cell table:style-name="ce9" table:formula="of:=AVERAGE([.E2:.E8])" office:value-type="float" office:value="237.573857142857" calcext:value-type="float">
            <text:p>237,573857142857</text:p>
          </table:table-cell>
          <table:table-cell table:style-name="ce9" table:formula="of:=AVERAGE([.F2:.F8])" office:value-type="float" office:value="467.988857142857" calcext:value-type="float">
            <text:p>467,988857142857</text:p>
          </table:table-cell>
          <table:table-cell table:style-name="ce9"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TIME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0.82" calcext:value-type="float">
            <text:p>20,82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79" calcext:value-type="float">
            <text:p>38,79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4.11" calcext:value-type="float">
            <text:p>94,11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7.57" calcext:value-type="float">
            <text:p>237,57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67.99" calcext:value-type="float">
            <text:p>467,99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06:58:10.19326513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6-06-12T07:18:12.420867449</dc:date>
    <meta:editing-duration>P2DT5H12M46S</meta:editing-duration>
    <meta:editing-cycles>492</meta:editing-cycles>
    <meta:generator>LibreOffice/24.2.7.2$Linux_X86_64 LibreOffice_project/420$Build-2</meta:generator>
    <meta:document-statistic meta:table-count="11" meta:cell-count="24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9cm" svg:y="0.315cm" chart:style-name="ch2">
          <text:p>AVERAGE EXECUTION TIME</text:p>
        </chart:title>
        <chart:legend chart:legend-position="end" svg:x="13.817cm" svg:y="4.212cm" style:legend-expansion="high" chart:style-name="ch3"/>
        <chart:plot-area chart:style-name="ch4" table:cell-range-address="Φύλλο11.C16:Φύλλο11.D20 Φύλλο11.D15:Φύλλο11.D15" chart:data-source-has-labels="both" svg:x="1.314cm" svg:y="1.28cm" svg:width="12.183cm" svg:height="6.576cm">
          <chart:coordinate-region svg:x="2.139cm" svg:y="1.468cm" svg:width="10.97cm" svg:height="5.763cm"/>
          <chart:axis chart:dimension="x" chart:name="primary-x" chart:style-name="ch5" chartooo:axis-type="auto">
            <chartooo:date-scale/>
            <chart:title svg:x="6.089cm" svg:y="8.037cm" chart:style-name="ch6">
              <text:p>CHROMOSOMES</text:p>
            </chart:title>
            <chart:categories table:cell-range-address="Φύλλο11.C16:Φύλλο11.C20"/>
          </chart:axis>
          <chart:axis chart:dimension="y" chart:name="primary-y" chart:style-name="ch5">
            <chart:title svg:x="0.451cm" svg:y="5.939cm" chart:style-name="ch7">
              <text:p>EXECUTION TIME</text:p>
            </chart:title>
            <chart:grid chart:style-name="ch8" chart:class="major"/>
          </chart:axis>
          <chart:series chart:style-name="ch9" chart:values-cell-range-address="Φύλλο11.D16:Φύλλο11.D20" chart:label-cell-address="Φύλλο11.D15:Φύλλο11.D1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Φύλλο11.D15:Φύλλο11.D1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Φύλλο11.C16:Φύλλο11.C20</svg:desc>
                </draw:g>
              </table:table-cell>
              <table:table-cell office:value-type="float" office:value="20.82">
                <text:p>20.82</text:p>
                <draw:g>
                  <svg:desc>Φύλλο11.D16:Φύλλο11.D2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79">
                <text:p>38.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7.57">
                <text:p>237.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7.99">
                <text:p>46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