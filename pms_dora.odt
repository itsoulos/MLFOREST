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1">
      <style:text-properties officeooo:rsid="0015e6be" officeooo:paragraph-rsid="0015e6be"/>
    </style:style>
    <style:style style:name="P2" style:family="paragraph" style:parent-style-name="Text_20_body" style:list-style-name="L1">
      <style:text-properties officeooo:rsid="001635f1" officeooo:paragraph-rsid="001635f1"/>
    </style:style>
    <style:style style:name="P3" style:family="paragraph" style:parent-style-name="Text_20_body" style:list-style-name="L1">
      <style:text-properties officeooo:rsid="001635f1" officeooo:paragraph-rsid="001724f7"/>
    </style:style>
    <style:style style:name="P4" style:family="paragraph" style:parent-style-name="Text_20_body" style:list-style-name="L1">
      <style:text-properties officeooo:rsid="0017296c" officeooo:paragraph-rsid="0017296c"/>
    </style:style>
    <style:style style:name="P5" style:family="paragraph" style:parent-style-name="Text_20_body" style:list-style-name="L1">
      <style:text-properties officeooo:rsid="001913ff" officeooo:paragraph-rsid="001913ff"/>
    </style:style>
    <style:style style:name="P6" style:family="paragraph" style:parent-style-name="Text_20_body" style:list-style-name="L2">
      <style:text-properties officeooo:rsid="001a3ea5" officeooo:paragraph-rsid="001a3ea5"/>
    </style:style>
    <style:style style:name="T1" style:family="text">
      <style:text-properties officeooo:rsid="001724f7"/>
    </style:style>
    <style:style style:name="T2" style:family="text">
      <style:text-properties officeooo:rsid="001a39f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1. Δώρα </text:h>
      <text:list text:style-name="L1">
        <text:list-item>
          <text:p text:style-name="P2">Μελέτη αρχικού paper. Κατανόηση των επιμέρους στηλών.</text:p>
        </text:list-item>
        <text:list-item>
          <text:p text:style-name="P3"><text:span text:style-name="T1">Διάβασμα MLP νευρωνικών δικτύων. </text:span></text:p>
        </text:list-item>
        <text:list-item>
          <text:p text:style-name="P3"><text:span text:style-name="T1">Χρήση WEKA και GlobalOptimus </text:span><text:span text:style-name="T2">( ή άλλο λογισμικό από ίντερνετ) </text:span><text:span text:style-name="T1">για εκπαίδευση MLP.</text:span></text:p>
        </text:list-item>
        <text:list-item>
          <text:p text:style-name="P4">Διάβασμα RBF νευρωνικών δικτύων.</text:p>
        </text:list-item>
        <text:list-item>
          <text:p text:style-name="P5">Διάβασμα της τεχνικής Random Forest.</text:p>
        </text:list-item>
        <text:list-item>
          <text:p text:style-name="P3">Χρήση weka στο urban dataset. Τεχνικές από weka: rbf, mlp, random forest.</text:p>
        </text:list-item>
        <text:list-item>
          <text:p text:style-name="P2">Να εμφανιστούν οι τιμές για accuracy, precision, recall για κάθε τεχνική.</text:p>
        </text:list-item>
      </text:list>
      <text:h text:style-name="P1" text:outline-level="1">2. Κωνσταντίνα</text:h>
      <text:list text:style-name="L2">
        <text:list-item>
          <text:p text:style-name="P6">Ανάγνωση και παρουσίαση της τεχνικής PCA.</text:p>
        </text:list-item>
        <text:list-item>
          <text:p text:style-name="P6">Ανάγνωση και παρουσίαση της τεχνικής MRMR.</text:p>
        </text:list-item>
        <text:list-item>
          <text:p text:style-name="P6">Ανάγνωση της τεχνικής κατασκευής χαρακτηριστικών με χρήση Grammatical Evolution.</text:p>
        </text:list-item>
        <text:list-item>
          <text:p text:style-name="P6">Εφαρμογή της τεχνικής PCA στα υπάρχοντα δεδομένα και παρουσίαση αποτελεσμάτων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5T11:25:39.047985209</meta:creation-date>
    <dc:date>2026-05-15T12:21:09.677141313</dc:date>
    <meta:editing-duration>PT55M28S</meta:editing-duration>
    <meta:editing-cycles>7</meta:editing-cycles>
    <meta:generator>LibreOffice/25.2.3.2$Linux_X86_64 LibreOffice_project/520$Build-2</meta:generator>
    <meta:document-statistic meta:table-count="0" meta:image-count="0" meta:object-count="0" meta:page-count="1" meta:paragraph-count="13" meta:word-count="102" meta:character-count="666" meta:non-whitespace-character-count="586"/>
  </office:meta>
</office:document-meta>
</file>